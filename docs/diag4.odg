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="" draw:marker-end-width="0.321cm" draw:textarea-vertical-align="middle" fo:padding-top="0.165cm" fo:padding-bottom="0.165cm" fo:padding-left="0.29cm" fo:padding-right="0.29cm" loext:decorative="false"/>
    </style:style>
    <style:style style:name="gr2" style:family="graphic" style:parent-style-name="standard">
      <style:graphic-properties draw:fill="solid" draw:fill-color="#ffffff" draw:textarea-vertical-align="middle" draw:auto-grow-height="false" fo:min-height="2.397cm" fo:min-width="4.25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1" draw:marker-end-width="0.3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000000" draw:marker-start-width="0.321cm" draw:marker-end="Arrowheads_20_1" draw:marker-end-width="0.321cm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000000" draw:marker-start-width="0.321cm" draw:marker-end="" draw:marker-end-width="0.3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081cm" svg:stroke-color="#000000" draw:marker-start-width="0.321cm" draw:marker-end="" draw:marker-end-width="0.3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17cm" svg:y1="5.262cm" svg:x2="24.247cm" svg:y2="5.262cm">
          <text:p/>
        </draw:line>
        <draw:custom-shape draw:style-name="gr2" draw:text-style-name="P2" draw:layer="layout" svg:width="4.756cm" svg:height="2.647cm" svg:x="4.992cm" svg:y="3.961cm">
          <text:p text:style-name="P1">Upstrea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56cm" svg:height="2.647cm" svg:x="10.292cm" svg:y="11.062cm">
          <text:p text:style-name="P1">Downstream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56cm" svg:height="2.647cm" svg:x="15.892cm" svg:y="11.063cm">
          <text:p text:style-name="P1">Downstream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56cm" svg:height="2.647cm" svg:x="23.192cm" svg:y="11.064cm">
          <text:p text:style-name="P1">Downstream</text:p>
          <text:p text:style-name="P1">N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31cm" svg:height="0.962cm" svg:x="21.361cm" svg:y="11.876cm">
          <draw:text-box>
            <text:p>...</text:p>
          </draw:text-box>
        </draw:frame>
        <draw:line draw:style-name="gr4" draw:text-style-name="P4" draw:layer="layout" svg:x1="11.147cm" svg:y1="5.263cm" svg:x2="11.147cm" svg:y2="11.062cm">
          <text:p/>
        </draw:line>
        <draw:line draw:style-name="gr4" draw:text-style-name="P4" draw:layer="layout" svg:x1="16.847cm" svg:y1="5.264cm" svg:x2="16.847cm" svg:y2="11.063cm">
          <text:p/>
        </draw:line>
        <draw:line draw:style-name="gr4" draw:text-style-name="P4" draw:layer="layout" svg:x1="24.247cm" svg:y1="5.265cm" svg:x2="24.247cm" svg:y2="11.064cm">
          <text:p/>
        </draw:line>
        <draw:line draw:style-name="gr5" draw:text-style-name="P1" draw:layer="layout" svg:x1="5.635cm" svg:y1="9.879cm" svg:x2="5.635cm" svg:y2="6.619cm">
          <text:p/>
        </draw:line>
        <draw:line draw:style-name="gr5" draw:text-style-name="P1" draw:layer="layout" svg:x1="6.435cm" svg:y1="8.979cm" svg:x2="6.435cm" svg:y2="6.619cm">
          <text:p/>
        </draw:line>
        <draw:line draw:style-name="gr5" draw:text-style-name="P1" draw:layer="layout" svg:x1="8.735cm" svg:y1="7.679cm" svg:x2="8.735cm" svg:y2="6.619cm">
          <text:p/>
        </draw:line>
        <draw:frame draw:style-name="gr3" draw:text-style-name="P3" draw:layer="layout" svg:width="1.031cm" svg:height="0.962cm" svg:x="6.862cm" svg:y="6.476cm">
          <draw:text-box>
            <text:p>...</text:p>
          </draw:text-box>
        </draw:frame>
        <draw:line draw:style-name="gr6" draw:text-style-name="P4" draw:layer="layout" svg:x1="8.735cm" svg:y1="7.679cm" svg:x2="26.777cm" svg:y2="7.679cm">
          <text:p/>
        </draw:line>
        <draw:line draw:style-name="gr6" draw:text-style-name="P4" draw:layer="layout" svg:x1="6.435cm" svg:y1="8.979cm" svg:x2="19.577cm" svg:y2="8.979cm">
          <text:p/>
        </draw:line>
        <draw:line draw:style-name="gr7" draw:text-style-name="P4" draw:layer="layout" svg:x1="5.635cm" svg:y1="9.879cm" svg:x2="13.877cm" svg:y2="9.879cm">
          <text:p text:style-name="P1">`</text:p>
        </draw:line>
        <draw:line draw:style-name="gr8" draw:text-style-name="P4" draw:layer="layout" svg:x1="13.877cm" svg:y1="9.879cm" svg:x2="13.877cm" svg:y2="11.062cm">
          <text:p/>
        </draw:line>
        <draw:line draw:style-name="gr6" draw:text-style-name="P4" draw:layer="layout" svg:x1="13.877cm" svg:y1="9.88cm" svg:x2="13.877cm" svg:y2="11.063cm">
          <text:p/>
        </draw:line>
        <draw:line draw:style-name="gr6" draw:text-style-name="P4" draw:layer="layout" svg:x1="19.577cm" svg:y1="8.979cm" svg:x2="19.577cm" svg:y2="11.064cm">
          <text:p/>
        </draw:line>
        <draw:line draw:style-name="gr6" draw:text-style-name="P4" draw:layer="layout" svg:x1="26.777cm" svg:y1="7.679cm" svg:x2="26.777cm" svg:y2="11.06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9T20:46:21.477631055</meta:creation-date>
    <dc:date>2026-07-19T22:30:19.398334278</dc:date>
    <meta:editing-duration>PT1H20M8S</meta:editing-duration>
    <meta:editing-cycles>6</meta:editing-cycles>
    <meta:generator>LibreOffice/26.2.4.2$Linux_X86_64 LibreOffice_project/620$Build-2</meta:generator>
    <meta:document-statistic meta:object-count="20"/>
  </office:meta>
</office:document-meta>
</file>