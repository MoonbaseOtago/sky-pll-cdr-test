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23ff23" draw:marker-start-width="0.279cm" draw:marker-end="Arrowheads_20_1" draw:marker-end-width="0.279cm" draw:fill="none" draw:textarea-vertical-align="middle" fo:padding-top="0.151cm" fo:padding-bottom="0.151cm" fo:padding-left="0.276cm" fo:padding-right="0.276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.261cm" fo:min-width="0.363cm" loext:decorative="false"/>
    </style:style>
    <style:style style:name="gr3" style:family="graphic" style:parent-style-name="standard">
      <style:graphic-properties draw:fill="solid" draw:fill-color="#ffffff" draw:textarea-vertical-align="middle" draw:auto-grow-height="false" fo:min-height="2.397cm" fo:min-width="4.256cm" loext:decorative="false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252cm" draw:marker-end="Arrowheads_20_1" draw:marker-end-width="0.252cm" draw:fill="none" draw:textarea-vertical-align="middle" fo:padding-top="0.142cm" fo:padding-bottom="0.142cm" fo:padding-left="0.267cm" fo:padding-right="0.267cm" loext:decorative="false"/>
    </style:style>
    <style:style style:name="gr5" style:family="graphic" style:parent-style-name="objectwithoutfill">
      <style:graphic-properties svg:stroke-width="0.035cm" svg:stroke-color="#000000" draw:marker-start="" draw:marker-start-width="0.252cm" draw:marker-end="" draw:marker-end-width="0.2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color="#333333" draw:fill="none" draw:fill-color="#ffffff" loext:fill-use-slide-background="false" draw:textarea-horizontal-align="justify" draw:textarea-vertical-align="middle" draw:auto-grow-height="false" fo:min-height="1.908cm" fo:min-width="0.476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center"/>
      <style:text-properties fo:font-weight="normal"/>
    </style:style>
    <style:style style:name="P5" style:family="paragraph">
      <loext:graphic-properties draw:fill="solid" draw:fill-color="#ffffff"/>
      <style:paragraph-properties fo:text-align="center"/>
      <style:text-properties fo:font-weight="normal"/>
    </style:style>
    <style:style style:name="P6" style:family="paragraph">
      <loext:graphic-properties draw:fill="none"/>
      <style:paragraph-properties fo:text-align="center"/>
      <style:text-properties fo:font-weight="bold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268cm" svg:y1="10.178cm" svg:x2="5.268cm" svg:y2="16.745cm">
          <text:p/>
        </draw:line>
        <draw:line draw:style-name="gr1" draw:text-style-name="P1" draw:layer="layout" svg:x1="24.467cm" svg:y1="10.178cm" svg:x2="24.467cm" svg:y2="16.745cm">
          <text:p/>
        </draw:line>
        <draw:custom-shape draw:style-name="gr2" draw:text-style-name="P2" draw:layer="layout" svg:width="1.725cm" svg:height="1.725cm" svg:x="22.394cm" svg:y="10.219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1.725cm" svg:height="1.725cm" svg:x="24.926cm" svg:y="10.218cm">
          <text:p/>
          <draw:enhanced-geometry svg:viewBox="0 0 21600 21600" draw:text-areas="?f0 ?f7 ?f2 21600" draw:mirror-horizontal="false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4.756cm" svg:height="2.647cm" svg:x="2.992cm" svg:y="4.861cm">
          <text:p text:style-name="P2">PLL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756cm" svg:height="2.647cm" svg:x="21.865cm" svg:y="4.862cm">
          <text:p text:style-name="P2">CDR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756cm" svg:height="2.647cm" svg:x="2.992cm" svg:y="7.473cm">
          <text:p text:style-name="P4">8B10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756cm" svg:height="2.647cm" svg:x="21.865cm" svg:y="7.474cm">
          <text:p text:style-name="P4">8B10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8.493cm" svg:y1="6.216cm" svg:x2="21.866cm" svg:y2="6.216cm">
          <text:p/>
        </draw:line>
        <draw:line draw:style-name="gr5" draw:text-style-name="P6" draw:layer="layout" svg:x1="18.513cm" svg:y1="6.216cm" svg:x2="18.513cm" svg:y2="8.116cm">
          <text:p/>
        </draw:line>
        <draw:line draw:style-name="gr4" draw:text-style-name="P6" draw:layer="layout" svg:x1="21.866cm" svg:y1="8.942cm" svg:x2="7.748cm" svg:y2="8.941cm">
          <text:p/>
        </draw:line>
        <draw:line draw:style-name="gr4" draw:text-style-name="P6" draw:layer="layout" svg:x1="7.749cm" svg:y1="8.116cm" svg:x2="21.865cm" svg:y2="8.087cm">
          <text:p/>
        </draw:line>
        <draw:custom-shape draw:style-name="gr6" draw:text-style-name="P7" draw:layer="layout" svg:width="1.38cm" svg:height="3.05cm" svg:x="14.558cm" svg:y="7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3.254cm" svg:height="0.962cm" svg:x="3.563cm" svg:y="3.426cm">
          <draw:text-box>
            <text:p>Upstream</text:p>
          </draw:text-box>
        </draw:frame>
        <draw:frame draw:style-name="gr7" draw:text-style-name="P8" draw:layer="layout" svg:width="4.066cm" svg:height="0.962cm" svg:x="22.363cm" svg:y="3.426cm">
          <draw:text-box>
            <text:p>Downstream</text:p>
          </draw:text-box>
        </draw:frame>
        <draw:frame draw:style-name="gr7" draw:text-style-name="P8" draw:layer="layout" svg:width="2.114cm" svg:height="0.962cm" svg:x="14.224cm" svg:y="10.45cm">
          <draw:text-box>
            <text:p>LVDS</text:p>
          </draw:text-box>
        </draw:frame>
        <draw:custom-shape draw:style-name="gr2" draw:text-style-name="P2" draw:layer="layout" svg:width="1.725cm" svg:height="1.725cm" svg:x="3.195cm" svg:y="10.219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1.725cm" svg:height="1.725cm" svg:x="5.727cm" svg:y="10.218cm">
          <text:p/>
          <draw:enhanced-geometry svg:viewBox="0 0 21600 21600" draw:text-areas="?f0 ?f7 ?f2 21600" draw:mirror-horizontal="false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custom-shape draw:style-name="gr3" draw:text-style-name="P5" draw:layer="layout" svg:width="4.756cm" svg:height="2.647cm" svg:x="2.992cm" svg:y="12.074cm">
          <text:p text:style-name="P4">Management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756cm" svg:height="2.647cm" svg:x="21.992cm" svg:y="12.075cm">
          <text:p text:style-name="P4">Managemen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25cm" svg:height="1.725cm" svg:x="22.395cm" svg:y="14.92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1.725cm" svg:height="1.725cm" svg:x="24.927cm" svg:y="14.919cm">
          <text:p/>
          <draw:enhanced-geometry svg:viewBox="0 0 21600 21600" draw:text-areas="?f0 ?f7 ?f2 21600" draw:mirror-horizontal="false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1.725cm" svg:height="1.725cm" svg:x="3.196cm" svg:y="14.92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1.725cm" svg:height="1.725cm" svg:x="5.728cm" svg:y="14.919cm">
          <text:p/>
          <draw:enhanced-geometry svg:viewBox="0 0 21600 21600" draw:text-areas="?f0 ?f7 ?f2 21600" draw:mirror-horizontal="false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1321 3493" svg:d="M1321 3493h-1321l702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19T20:46:21.477631055</meta:creation-date>
    <dc:date>2026-07-19T21:46:27.390714316</dc:date>
    <meta:editing-duration>PT36M16S</meta:editing-duration>
    <meta:editing-cycles>5</meta:editing-cycles>
    <meta:generator>LibreOffice/26.2.4.2$Linux_X86_64 LibreOffice_project/620$Build-2</meta:generator>
    <meta:document-statistic meta:object-count="24"/>
  </office:meta>
</office:document-meta>
</file>