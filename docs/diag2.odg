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23ff23" draw:marker-start-width="0.279cm" draw:marker-end="Arrowheads_20_1" draw:marker-end-width="0.279cm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963cm" fo:min-width="0.363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261cm" fo:min-width="0.363cm" loext:decorative="false"/>
    </style:style>
    <style:style style:name="gr4" style:family="graphic" style:parent-style-name="objectwithoutfill">
      <style:graphic-properties svg:stroke-width="0.035cm" svg:stroke-color="#000000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fill="solid" draw:fill-color="#ffffff" draw:textarea-vertical-align="middle" draw:auto-grow-height="false" fo:min-height="2.397cm" fo:min-width="4.256cm" loext:decorative="false"/>
      <style:paragraph-properties style:writing-mode="lr-tb"/>
    </style:style>
    <style:style style:name="gr6" style:family="graphic" style:parent-style-name="standard">
      <style:graphic-properties draw:fill="solid" draw:fill-color="#ffffff" draw:textarea-vertical-align="middle" draw:auto-grow-height="false" fo:min-height="2.397cm" fo:min-width="2.656cm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106cm" svg:stroke-color="#0084d1" draw:marker-start-width="0.358cm" draw:marker-end="" draw:marker-end-width="0.358cm" draw:fill="none" draw:textarea-vertical-align="middle" fo:padding-top="0.177cm" fo:padding-bottom="0.177cm" fo:padding-left="0.302cm" fo:padding-right="0.302cm" loext:decorative="false"/>
    </style:style>
    <style:style style:name="gr9" style:family="graphic" style:parent-style-name="objectwithoutfill">
      <style:graphic-properties svg:stroke-width="0.106cm" svg:stroke-color="#0084d1" draw:marker-start-width="0.358cm" draw:marker-end="Arrowheads_20_1" draw:marker-end-width="0.358cm" draw:fill="none" draw:textarea-vertical-align="middle" fo:padding-top="0.177cm" fo:padding-bottom="0.177cm" fo:padding-left="0.302cm" fo:padding-right="0.302cm" loext:decorative="false"/>
    </style:style>
    <style:style style:name="gr10" style:family="graphic" style:parent-style-name="objectwithoutfill">
      <style:graphic-properties svg:stroke-width="0.106cm" svg:stroke-color="#ff3366" draw:marker-start-width="0.358cm" draw:marker-end="" draw:marker-end-width="0.358cm" draw:fill="none" draw:textarea-vertical-align="middle" fo:padding-top="0.177cm" fo:padding-bottom="0.177cm" fo:padding-left="0.302cm" fo:padding-right="0.302cm" loext:decorative="false"/>
    </style:style>
    <style:style style:name="gr11" style:family="graphic" style:parent-style-name="objectwithoutfill">
      <style:graphic-properties svg:stroke-width="0.106cm" svg:stroke-color="#ff3366" draw:marker-start-width="0.358cm" draw:marker-end="Arrowheads_20_1" draw:marker-end-width="0.358cm" draw:fill="none" draw:textarea-vertical-align="middle" fo:padding-top="0.177cm" fo:padding-bottom="0.177cm" fo:padding-left="0.302cm" fo:padding-right="0.302cm" loext:decorative="false"/>
    </style:style>
    <style:style style:name="gr12" style:family="graphic" style:parent-style-name="standard">
      <style:graphic-properties svg:stroke-color="#333333" draw:fill="none" draw:fill-color="#ffffff" loext:fill-use-slide-background="false" draw:textarea-horizontal-align="justify" draw:textarea-vertical-align="middle" draw:auto-grow-height="false" fo:min-height="3.791cm" fo:min-width="0.476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standard">
      <style:graphic-properties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  <style:text-properties fo:font-weight="normal"/>
    </style:style>
    <style:style style:name="P6" style:family="paragraph">
      <loext:graphic-properties draw:fill="solid" draw:fill-color="#ffffff"/>
      <style:paragraph-properties fo:text-align="center"/>
      <style:text-properties fo:font-weight="normal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4.467cm" svg:y1="10.978cm" svg:x2="24.467cm" svg:y2="17.545cm">
          <text:p/>
        </draw:line>
        <draw:line draw:style-name="gr1" draw:text-style-name="P1" draw:layer="layout" svg:x1="4.966cm" svg:y1="10.977cm" svg:x2="4.966cm" svg:y2="17.544cm">
          <text:p/>
        </draw:line>
        <draw:custom-shape draw:style-name="gr2" draw:text-style-name="P2" draw:layer="layout" svg:width="1.725cm" svg:height="3.671cm" svg:x="22.395cm" svg:y="13.874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725cm" svg:height="1.725cm" svg:x="22.394cm" svg:y="11.419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725cm" svg:height="1.725cm" svg:x="24.926cm" svg:y="15.818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725cm" svg:height="3.671cm" svg:x="2.894cm" svg:y="13.874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725cm" svg:height="1.725cm" svg:x="2.893cm" svg:y="11.419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line draw:style-name="gr4" draw:text-style-name="P3" draw:layer="layout" svg:x1="10.067cm" svg:y1="14.223cm" svg:x2="7.522cm" svg:y2="14.223cm">
          <text:p/>
        </draw:line>
        <draw:custom-shape draw:style-name="gr5" draw:text-style-name="P4" draw:layer="layout" svg:width="4.756cm" svg:height="2.647cm" svg:x="2.992cm" svg:y="4.861cm">
          <text:p text:style-name="P2">PLL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756cm" svg:height="2.647cm" svg:x="21.865cm" svg:y="4.862cm">
          <text:p text:style-name="P2">CD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756cm" svg:height="2.647cm" svg:x="2.992cm" svg:y="8.773cm">
          <text:p text:style-name="P5">8B10</text:p>
          <text:p text:style-name="P5">Encod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756cm" svg:height="2.647cm" svg:x="21.865cm" svg:y="8.774cm">
          <text:p text:style-name="P5">8B10</text:p>
          <text:p text:style-name="P5">Decod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756cm" svg:height="2.647cm" svg:x="21.892cm" svg:y="12.774cm">
          <text:p text:style-name="P5">8B10</text:p>
          <text:p text:style-name="P5">Encod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756cm" svg:height="2.647cm" svg:x="2.865cm" svg:y="12.775cm">
          <text:p text:style-name="P5">8B10</text:p>
          <text:p text:style-name="P5">Decod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156cm" svg:height="2.647cm" svg:x="7.565cm" svg:y="12.776cm">
          <text:p text:style-name="P5">DeSkew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8.493cm" svg:y1="6.216cm" svg:x2="21.866cm" svg:y2="6.216cm">
          <text:p/>
        </draw:line>
        <draw:line draw:style-name="gr7" draw:text-style-name="P3" draw:layer="layout" svg:x1="18.512cm" svg:y1="6.216cm" svg:x2="18.513cm" svg:y2="10.116cm">
          <text:p/>
        </draw:line>
        <draw:line draw:style-name="gr4" draw:text-style-name="P3" draw:layer="layout" svg:x1="21.866cm" svg:y1="14.242cm" svg:x2="10.821cm" svg:y2="14.241cm">
          <text:p/>
        </draw:line>
        <draw:line draw:style-name="gr8" draw:text-style-name="P3" draw:layer="layout" svg:x1="27.771cm" svg:y1="6.156cm" svg:x2="27.772cm" svg:y2="14.23cm">
          <text:p/>
        </draw:line>
        <draw:line draw:style-name="gr4" draw:text-style-name="P3" draw:layer="layout" svg:x1="7.749cm" svg:y1="10.116cm" svg:x2="21.865cm" svg:y2="10.087cm">
          <text:p/>
        </draw:line>
        <draw:line draw:style-name="gr9" draw:text-style-name="P3" draw:layer="layout" svg:x1="27.772cm" svg:y1="14.23cm" svg:x2="26.648cm" svg:y2="14.23cm">
          <text:p/>
        </draw:line>
        <draw:line draw:style-name="gr9" draw:text-style-name="P3" draw:layer="layout" svg:x1="27.772cm" svg:y1="10.03cm" svg:x2="26.648cm" svg:y2="10.03cm">
          <text:p/>
        </draw:line>
        <draw:line draw:style-name="gr8" draw:text-style-name="P3" draw:layer="layout" svg:x1="27.772cm" svg:y1="6.13cm" svg:x2="26.648cm" svg:y2="6.13cm">
          <text:p/>
        </draw:line>
        <draw:line draw:style-name="gr10" draw:text-style-name="P3" draw:layer="layout" svg:x1="1.849cm" svg:y1="6.156cm" svg:x2="1.848cm" svg:y2="14.23cm">
          <text:p/>
        </draw:line>
        <draw:line draw:style-name="gr11" draw:text-style-name="P3" draw:layer="layout" svg:x1="1.848cm" svg:y1="14.23cm" svg:x2="2.972cm" svg:y2="14.23cm">
          <text:p/>
        </draw:line>
        <draw:line draw:style-name="gr11" draw:text-style-name="P3" draw:layer="layout" svg:x1="1.848cm" svg:y1="10.03cm" svg:x2="2.972cm" svg:y2="10.03cm">
          <text:p/>
        </draw:line>
        <draw:line draw:style-name="gr10" draw:text-style-name="P3" draw:layer="layout" svg:x1="1.848cm" svg:y1="6.13cm" svg:x2="2.972cm" svg:y2="6.13cm">
          <text:p/>
        </draw:line>
        <draw:custom-shape draw:style-name="gr3" draw:text-style-name="P2" draw:layer="layout" svg:width="1.725cm" svg:height="1.725cm" svg:x="5.425cm" svg:y="15.818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38cm" svg:height="5.713cm" svg:x="14.558cm" svg:y="9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4.42cm" svg:height="0.962cm" svg:x="2.924cm" svg:y="18.15cm">
          <draw:text-box>
            <text:p>Byte Interface</text:p>
          </draw:text-box>
        </draw:frame>
        <draw:frame draw:style-name="gr13" draw:text-style-name="P8" draw:layer="layout" svg:width="4.42cm" svg:height="0.962cm" svg:x="22.424cm" svg:y="18.15cm">
          <draw:text-box>
            <text:p>Byte Interface</text:p>
          </draw:text-box>
        </draw:frame>
        <draw:frame draw:style-name="gr13" draw:text-style-name="P8" draw:layer="layout" svg:width="3.254cm" svg:height="0.962cm" svg:x="3.563cm" svg:y="3.426cm">
          <draw:text-box>
            <text:p>Upstream</text:p>
          </draw:text-box>
        </draw:frame>
        <draw:frame draw:style-name="gr13" draw:text-style-name="P8" draw:layer="layout" svg:width="4.066cm" svg:height="0.962cm" svg:x="22.363cm" svg:y="3.426cm">
          <draw:text-box>
            <text:p>Downstream</text:p>
          </draw:text-box>
        </draw:frame>
        <draw:frame draw:style-name="gr13" draw:text-style-name="P8" draw:layer="layout" svg:width="2.114cm" svg:height="0.962cm" svg:x="14.224cm" svg:y="15.35cm">
          <draw:text-box>
            <text:p>LVDS</text:p>
          </draw:text-box>
        </draw:frame>
        <draw:frame draw:style-name="gr13" draw:text-style-name="P8" draw:layer="layout" svg:width="2.09cm" svg:height="0.962cm" draw:transform="rotate (1.5707963267949) translate (0.949cm 11.064cm)">
          <draw:text-box>
            <text:p>Clock</text:p>
          </draw:text-box>
        </draw:frame>
        <draw:frame draw:style-name="gr13" draw:text-style-name="P8" draw:layer="layout" svg:width="5.337cm" svg:height="0.962cm" draw:transform="rotate (-1.5707963267949) translate (28.711cm 7.474cm)">
          <draw:text-box>
            <text:p>Recovered Clock</text:p>
          </draw:text-box>
        </draw:frame>
        <draw:line draw:style-name="gr14" draw:text-style-name="P2" draw:layer="layout" svg:x1="4.104cm" svg:y1="15.424cm" svg:x2="5.603cm" svg:y2="15.42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9T20:46:21.477631055</meta:creation-date>
    <dc:date>2026-07-19T21:33:47.872401290</dc:date>
    <meta:editing-duration>PT23M37S</meta:editing-duration>
    <meta:editing-cycles>4</meta:editing-cycles>
    <meta:generator>LibreOffice/26.2.4.2$Linux_X86_64 LibreOffice_project/620$Build-2</meta:generator>
    <meta:document-statistic meta:object-count="37"/>
  </office:meta>
</office:document-meta>
</file>